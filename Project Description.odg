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2000003991455A643.png" manifest:media-type="image/png"/>
  <manifest:file-entry manifest:full-path="Pictures/100000010000056200000399EF2650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Mono" svg:font-family="DejaVuSansMono"/>
    <style:font-face style:name="JetBrainsMonoNL" svg:font-family="JetBrainsMonoNL"/>
    <style:font-face style:name="JetBrainsMonoNL-Semi" svg:font-family="JetBrainsMonoNL-S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ColorEmoji" svg:font-family="NotoColorEmoj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0.94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6cm" fo:min-width="0.76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8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ababab" loext:decorative="false"/>
    </style:style>
    <style:style style:name="gr5" style:family="graphic" style:parent-style-name="standard">
      <style:graphic-properties draw:stroke="none" draw:fill="solid" draw:fill-color="#e0e0e0" loext:decorative="false"/>
    </style:style>
    <style:style style:name="gr6" style:family="graphic" style:parent-style-name="standard">
      <style:graphic-properties draw:stroke="none" draw:fill="solid" draw:fill-color="#9873f7" loext:decorative="false"/>
    </style:style>
    <style:style style:name="gr7" style:family="graphic" style:parent-style-name="standard">
      <style:graphic-properties draw:stroke="none" draw:fill="solid" draw:fill-color="#fafafa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.50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6.7000007629395pt" style:font-size-asian="26.7000007629395pt" style:font-size-complex="26.7000007629395pt"/>
    </style:style>
    <style:style style:name="P3" style:family="paragraph">
      <loext:graphic-properties draw:fill="none"/>
      <style:text-properties fo:font-size="21.7000007629395pt" style:font-size-asian="21.7000007629395pt" style:font-size-complex="21.7000007629395pt"/>
    </style:style>
    <style:style style:name="P4" style:family="paragraph">
      <loext:graphic-properties draw:fill="none"/>
      <style:text-properties fo:font-size="16.5pt" style:font-size-asian="16.5pt" style:font-size-complex="16.5pt"/>
    </style:style>
    <style:style style:name="P5" style:family="paragraph">
      <loext:graphic-properties draw:fill="solid" draw:fill-color="#ababab"/>
    </style:style>
    <style:style style:name="P6" style:family="paragraph">
      <loext:graphic-properties draw:fill="solid" draw:fill-color="#e0e0e0"/>
    </style:style>
    <style:style style:name="P7" style:family="paragraph">
      <loext:graphic-properties draw:fill="solid" draw:fill-color="#9873f7"/>
    </style:style>
    <style:style style:name="P8" style:family="paragraph">
      <loext:graphic-properties draw:fill="solid" draw:fill-color="#fafafa"/>
    </style:style>
    <style:style style:name="P9" style:family="paragraph">
      <loext:graphic-properties draw:fill="none"/>
      <style:text-properties fo:font-size="14.5pt" style:font-size-asian="14.5pt" style:font-size-complex="14.5pt"/>
    </style:style>
    <style:style style:name="P10" style:family="paragraph">
      <style:paragraph-properties fo:text-align="center"/>
    </style:style>
    <style:style style:name="T1" style:family="text">
      <style:text-properties fo:color="#000000" loext:opacity="100%" style:font-name="JetBrainsMonoNL" fo:font-size="26.7000007629395pt" fo:font-weight="bold" style:font-name-asian="JetBrainsMonoNL" style:font-size-asian="26.7000007629395pt" style:font-weight-asian="bold" style:font-name-complex="JetBrainsMonoNL" style:font-size-complex="26.7000007629395pt" style:font-weight-complex="bold"/>
    </style:style>
    <style:style style:name="T2" style:family="text">
      <style:text-properties fo:color="#000000" loext:opacity="100%" style:font-name="NotoColorEmoji" fo:font-size="21.7000007629395pt" fo:font-weight="normal" style:font-name-asian="NotoColorEmoji" style:font-size-asian="21.7000007629395pt" style:font-weight-asian="normal" style:font-name-complex="NotoColorEmoji" style:font-size-complex="21.7000007629395pt" style:font-weight-complex="normal"/>
    </style:style>
    <style:style style:name="T3" style:family="text">
      <style:text-properties fo:color="#000000" loext:opacity="100%" style:font-name="JetBrainsMonoNL" fo:font-size="21.7000007629395pt" fo:font-weight="bold" style:font-name-asian="JetBrainsMonoNL" style:font-size-asian="21.7000007629395pt" style:font-weight-asian="bold" style:font-name-complex="JetBrainsMonoNL" style:font-size-complex="21.7000007629395pt" style:font-weight-complex="bold"/>
    </style:style>
    <style:style style:name="T4" style:family="text">
      <style:text-properties fo:color="#000000" loext:opacity="100%" style:font-name="JetBrainsMonoNL-Semi" fo:font-size="16.5pt" fo:font-weight="bold" style:font-name-asian="JetBrainsMonoNL-Semi" style:font-size-asian="16.5pt" style:font-weight-asian="bold" style:font-name-complex="JetBrainsMonoNL-Semi" style:font-size-complex="16.5pt" style:font-weight-complex="bold"/>
    </style:style>
    <style:style style:name="T5" style:family="text">
      <style:text-properties fo:color="#000000" loext:opacity="100%" style:font-name="JetBrainsMonoNL" fo:font-size="16.5pt" fo:font-weight="normal" style:font-name-asian="JetBrainsMonoNL" style:font-size-asian="16.5pt" style:font-weight-asian="normal" style:font-name-complex="JetBrainsMonoNL" style:font-size-complex="16.5pt" style:font-weight-complex="normal"/>
    </style:style>
    <style:style style:name="T6" style:family="text">
      <style:text-properties fo:color="#000000" loext:opacity="100%" style:font-name="JetBrainsMonoNL" fo:font-size="16.5pt" fo:font-style="italic" fo:font-weight="normal" style:font-name-asian="JetBrainsMonoNL" style:font-size-asian="16.5pt" style:font-style-asian="italic" style:font-weight-asian="normal" style:font-name-complex="JetBrainsMonoNL" style:font-size-complex="16.5pt" style:font-style-complex="italic" style:font-weight-complex="normal"/>
    </style:style>
    <style:style style:name="T7" style:family="text">
      <style:text-properties fo:color="#000000" loext:opacity="100%" style:font-name="NotoColorEmoji" fo:font-size="16.5pt" fo:font-weight="normal" style:font-name-asian="NotoColorEmoji" style:font-size-asian="16.5pt" style:font-weight-asian="normal" style:font-name-complex="NotoColorEmoji" style:font-size-complex="16.5pt" style:font-weight-complex="normal"/>
    </style:style>
    <style:style style:name="T8" style:family="text">
      <style:text-properties fo:color="#222222" loext:opacity="100%" style:font-name="JetBrainsMonoNL-Semi" fo:font-size="16.5pt" fo:font-weight="bold" style:font-name-asian="JetBrainsMonoNL-Semi" style:font-size-asian="16.5pt" style:font-weight-asian="bold" style:font-name-complex="JetBrainsMonoNL-Semi" style:font-size-complex="16.5pt" style:font-weight-complex="bold"/>
    </style:style>
    <style:style style:name="T9" style:family="text">
      <style:text-properties fo:color="#222222" loext:opacity="100%" style:font-name="JetBrainsMonoNL" fo:font-size="16.5pt" fo:font-weight="normal" style:font-name-asian="JetBrainsMonoNL" style:font-size-asian="16.5pt" style:font-weight-asian="normal" style:font-name-complex="JetBrainsMonoNL" style:font-size-complex="16.5pt" style:font-weight-complex="normal"/>
    </style:style>
    <style:style style:name="T10" style:family="text">
      <style:text-properties fo:color="#222222" loext:opacity="100%" style:font-name="DejaVuSansMono" fo:font-size="14.5pt" fo:font-weight="normal" style:font-name-asian="DejaVuSansMono" style:font-size-asian="14.5pt" style:font-weight-asian="normal" style:font-name-complex="DejaVuSansMono" style:font-size-complex="14.5pt" style:font-weight-complex="normal"/>
    </style:style>
    <style:style style:name="T11" style:family="text">
      <style:text-properties fo:color="#e0ac00" loext:opacity="100%" style:font-name="DejaVuSansMono" fo:font-size="14.5pt" fo:font-weight="normal" style:font-name-asian="DejaVuSansMono" style:font-size-asian="14.5pt" style:font-weight-asian="normal" style:font-name-complex="DejaVuSansMono" style:font-size-complex="14.5pt" style:font-weight-complex="normal"/>
    </style:style>
    <style:style style:name="T12" style:family="text">
      <style:text-properties fo:color="#e93147" loext:opacity="100%" style:font-name="DejaVuSansMono" fo:font-size="14.5pt" fo:font-weight="normal" style:font-name-asian="DejaVuSansMono" style:font-size-asian="14.5pt" style:font-weight-asian="normal" style:font-name-complex="DejaVuSansMono" style:font-size-complex="14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763cm" svg:height="1.246cm" svg:x="1.826cm" svg:y="1.738cm">
          <draw:text-box>
            <text:p text:style-name="P1"><text:span text:style-name="T1">Project </text:span><text:span text:style-name="T1">Descripti</text:span><text:span text:style-name="T1">on</text:span></text:p>
          </draw:text-box>
        </draw:frame>
        <draw:frame draw:style-name="gr2" draw:text-style-name="P3" draw:layer="layout" svg:width="0.955cm" svg:height="0.898cm" svg:x="1.826cm" svg:y="3.416cm">
          <draw:text-box>
            <text:p text:style-name="P1"><text:span text:style-name="T2">📖</text:span></text:p>
          </draw:text-box>
        </draw:frame>
        <draw:frame draw:style-name="gr2" draw:text-style-name="P3" draw:layer="layout" svg:width="5.514cm" svg:height="1.013cm" svg:x="2.777cm" svg:y="3.345cm">
          <draw:text-box>
            <text:p text:style-name="P1"><text:span text:style-name="T3"><text:s/></text:span><text:span text:style-name="T3">Description</text:span></text:p>
          </draw:text-box>
        </draw:frame>
        <draw:frame draw:style-name="gr3" draw:text-style-name="P4" draw:layer="layout" svg:width="5.057cm" svg:height="0.788cm" svg:x="1.826cm" svg:y="4.749cm">
          <draw:text-box>
            <text:p text:style-name="P1"><text:span text:style-name="T4">Refrigerator Chef</text:span></text:p>
          </draw:text-box>
        </draw:frame>
        <draw:frame draw:style-name="gr3" draw:text-style-name="P4" draw:layer="layout" svg:width="10.437cm" svg:height="0.768cm" svg:x="7.763cm" svg:y="4.777cm">
          <draw:text-box>
            <text:p text:style-name="P1"><text:span text:style-name="T5"><text:s/></text:span><text:span text:style-name="T5">solves a daily </text:span><text:span text:style-name="T5">problem: </text:span><text:span text:style-name="T6">"What</text:span></text:p>
          </draw:text-box>
        </draw:frame>
        <draw:frame draw:style-name="gr3" draw:text-style-name="P4" draw:layer="layout" svg:width="13.57cm" svg:height="0.768cm" svg:x="1.826cm" svg:y="5.65cm">
          <draw:text-box>
            <text:p text:style-name="P1"><text:span text:style-name="T6">can I cook with </text:span><text:span text:style-name="T6">what I have </text:span><text:span text:style-name="T6">right now?"</text:span></text:p>
          </draw:text-box>
        </draw:frame>
        <draw:frame draw:style-name="gr3" draw:text-style-name="P4" draw:layer="layout" svg:width="16.703cm" svg:height="0.768cm" svg:x="1.826cm" svg:y="6.92cm">
          <draw:text-box>
            <text:p text:style-name="P1"><text:span text:style-name="T5">Instead of </text:span><text:span text:style-name="T5">browsing </text:span><text:span text:style-name="T5">endless recipes </text:span><text:span text:style-name="T5">that require</text:span></text:p>
          </draw:text-box>
        </draw:frame>
        <draw:frame draw:style-name="gr3" draw:text-style-name="P4" draw:layer="layout" svg:width="15.657cm" svg:height="0.768cm" svg:x="1.826cm" svg:y="7.794cm">
          <draw:text-box>
            <text:p text:style-name="P1"><text:span text:style-name="T5">special </text:span><text:span text:style-name="T5">purchases, this </text:span><text:span text:style-name="T5">tool works </text:span><text:span text:style-name="T5">backward —</text:span></text:p>
          </draw:text-box>
        </draw:frame>
        <draw:frame draw:style-name="gr3" draw:text-style-name="P4" draw:layer="layout" svg:width="16.355cm" svg:height="0.768cm" svg:x="1.826cm" svg:y="8.667cm">
          <draw:text-box>
            <text:p text:style-name="P1"><text:span text:style-name="T5">starting from </text:span><text:span text:style-name="T5">your actual </text:span><text:span text:style-name="T5">ingredients. </text:span><text:span text:style-name="T5">You tick</text:span></text:p>
          </draw:text-box>
        </draw:frame>
        <draw:frame draw:style-name="gr3" draw:text-style-name="P4" draw:layer="layout" svg:width="14.615cm" svg:height="0.768cm" svg:x="1.826cm" svg:y="9.54cm">
          <draw:text-box>
            <text:p text:style-name="P1"><text:span text:style-name="T5">the products </text:span><text:span text:style-name="T5">you own (eggs, </text:span><text:span text:style-name="T5">milk, chicken,</text:span></text:p>
          </draw:text-box>
        </draw:frame>
        <draw:frame draw:style-name="gr3" draw:text-style-name="P4" draw:layer="layout" svg:width="16.703cm" svg:height="0.768cm" svg:x="1.826cm" svg:y="10.413cm">
          <draw:text-box>
            <text:p text:style-name="P1"><text:span text:style-name="T5">vegetables…), </text:span><text:span text:style-name="T5">and the app </text:span><text:span text:style-name="T5">finds matching </text:span><text:span text:style-name="T5">recipes</text:span></text:p>
          </draw:text-box>
        </draw:frame>
        <draw:frame draw:style-name="gr3" draw:text-style-name="P4" draw:layer="layout" svg:width="17.05cm" svg:height="0.768cm" svg:x="1.826cm" svg:y="11.286cm">
          <draw:text-box>
            <text:p text:style-name="P1"><text:span text:style-name="T5">from a built-in </text:span><text:span text:style-name="T5">collection. If </text:span><text:span text:style-name="T5">a recipe lacks </text:span><text:span text:style-name="T5">1–2</text:span></text:p>
          </draw:text-box>
        </draw:frame>
        <draw:frame draw:style-name="gr3" draw:text-style-name="P4" draw:layer="layout" svg:width="16.355cm" svg:height="0.768cm" svg:x="1.826cm" svg:y="12.159cm">
          <draw:text-box>
            <text:p text:style-name="P1"><text:span text:style-name="T5">ingredients, </text:span><text:span text:style-name="T5">the app </text:span><text:span text:style-name="T5">highlights </text:span><text:span text:style-name="T5">what's missing,</text:span></text:p>
          </draw:text-box>
        </draw:frame>
        <draw:frame draw:style-name="gr3" draw:text-style-name="P4" draw:layer="layout" svg:width="16.008cm" svg:height="0.768cm" svg:x="1.826cm" svg:y="13.032cm">
          <draw:text-box>
            <text:p text:style-name="P1"><text:span text:style-name="T5">so you can </text:span><text:span text:style-name="T5">decide whether </text:span><text:span text:style-name="T5">to replace, </text:span><text:span text:style-name="T5">skip, or</text:span></text:p>
          </draw:text-box>
        </draw:frame>
        <draw:frame draw:style-name="gr3" draw:text-style-name="P4" draw:layer="layout" svg:width="5.222cm" svg:height="0.768cm" svg:x="1.826cm" svg:y="13.905cm">
          <draw:text-box>
            <text:p text:style-name="P1"><text:span text:style-name="T5">shop minimally.</text:span></text:p>
          </draw:text-box>
        </draw:frame>
        <draw:path draw:style-name="gr4" draw:text-style-name="P5" draw:layer="layout" svg:width="0.185cm" svg:height="0.185cm" svg:x="2.328cm" svg:y="16.827cm" svg:viewBox="0 0 186 186" svg:d="M186 93c0 13-2 25-7 36s-12 21-21 30-19 15-30 20-23 7-36 7c-12 0-24-2-35-7s-21-11-30-20-15-19-20-30-7-23-7-36 2-24 7-36c5-11 11-21 20-30s19-15 30-20 23-7 35-7c13 0 25 2 36 7s21 11 30 20 16 19 21 30c5 12 7 23 7 36z">
          <text:p/>
        </draw:path>
        <draw:frame draw:style-name="gr3" draw:text-style-name="P4" draw:layer="layout" svg:width="3.82cm" svg:height="0.788cm" svg:x="1.826cm" svg:y="15.147cm">
          <draw:text-box>
            <text:p text:style-name="P1"><text:span text:style-name="T4">Key features:</text:span></text:p>
          </draw:text-box>
        </draw:frame>
        <draw:frame draw:style-name="gr3" draw:text-style-name="P4" draw:layer="layout" svg:width="0.722cm" svg:height="0.679cm" svg:x="2.873cm" svg:y="16.552cm">
          <draw:text-box>
            <text:p text:style-name="P1"><text:span text:style-name="T7">✅</text:span></text:p>
          </draw:text-box>
        </draw:frame>
        <draw:frame draw:style-name="gr3" draw:text-style-name="P4" draw:layer="layout" svg:width="14.615cm" svg:height="0.768cm" svg:x="3.599cm" svg:y="16.498cm">
          <draw:text-box>
            <text:p text:style-name="P1"><text:span text:style-name="T5"><text:s/></text:span><text:span text:style-name="T5">Ingredient‐</text:span><text:span text:style-name="T5">based search — </text:span><text:span text:style-name="T5">no typing, just</text:span></text:p>
          </draw:text-box>
        </draw:frame>
        <draw:path draw:style-name="gr4" draw:text-style-name="P5" draw:layer="layout" svg:width="0.185cm" svg:height="0.185cm" svg:x="2.328cm" svg:y="18.653cm" svg:viewBox="0 0 186 186" svg:d="M186 92c0 13-2 24-7 37-5 11-12 21-21 30-9 8-19 15-30 20-11 4-23 7-36 7-12 0-24-3-35-7-11-5-21-12-30-20-9-9-15-19-20-30-5-13-7-24-7-37 0-12 2-24 7-35 5-12 11-22 20-30 9-9 19-16 30-20 11-5 23-7 35-7 13 0 25 2 36 7 11 4 21 11 30 20 9 8 16 18 21 30 5 11 7 23 7 35z">
          <text:p/>
        </draw:path>
        <draw:frame draw:style-name="gr3" draw:text-style-name="P4" draw:layer="layout" svg:width="1.742cm" svg:height="0.768cm" svg:x="2.873cm" svg:y="17.371cm">
          <draw:text-box>
            <text:p text:style-name="P1"><text:span text:style-name="T5">click</text:span></text:p>
          </draw:text-box>
        </draw:frame>
        <draw:frame draw:style-name="gr3" draw:text-style-name="P4" draw:layer="layout" svg:width="0.722cm" svg:height="0.679cm" svg:x="2.873cm" svg:y="18.378cm">
          <draw:text-box>
            <text:p text:style-name="P1"><text:span text:style-name="T7">🧠</text:span></text:p>
          </draw:text-box>
        </draw:frame>
        <draw:frame draw:style-name="gr3" draw:text-style-name="P4" draw:layer="layout" svg:width="14.615cm" svg:height="0.768cm" svg:x="3.599cm" svg:y="18.324cm">
          <draw:text-box>
            <text:p text:style-name="P1"><text:span text:style-name="T5"><text:s/></text:span><text:span text:style-name="T5">Smart matching </text:span><text:span text:style-name="T5">— shows recipes </text:span><text:span text:style-name="T5">missing ≤2</text:span></text:p>
          </draw:text-box>
        </draw:frame>
        <draw:path draw:style-name="gr4" draw:text-style-name="P5" draw:layer="layout" svg:width="0.185cm" svg:height="0.185cm" svg:x="2.328cm" svg:y="20.505cm" svg:viewBox="0 0 186 186" svg:d="M186 92c0 13-2 24-7 37-5 11-12 21-21 30-9 8-19 15-30 20s-23 7-36 7c-12 0-24-2-35-7s-21-12-30-20c-9-9-15-19-20-30-5-13-7-24-7-37 0-12 2-24 7-35s11-21 20-30 19-16 30-20c11-5 23-7 35-7 13 0 25 2 36 7 11 4 21 11 30 20s16 19 21 30 7 23 7 35z">
          <text:p/>
        </draw:path>
        <draw:frame draw:style-name="gr3" draw:text-style-name="P4" draw:layer="layout" svg:width="3.829cm" svg:height="0.768cm" svg:x="2.873cm" svg:y="19.197cm">
          <draw:text-box>
            <text:p text:style-name="P1"><text:span text:style-name="T5">ingredients</text:span></text:p>
          </draw:text-box>
        </draw:frame>
        <draw:frame draw:style-name="gr3" draw:text-style-name="P4" draw:layer="layout" svg:width="0.722cm" svg:height="0.679cm" svg:x="2.873cm" svg:y="20.23cm">
          <draw:text-box>
            <text:p text:style-name="P1"><text:span text:style-name="T7">🥗</text:span></text:p>
          </draw:text-box>
        </draw:frame>
        <draw:frame draw:style-name="gr3" draw:text-style-name="P4" draw:layer="layout" svg:width="15.31cm" svg:height="0.768cm" svg:x="3.599cm" svg:y="20.176cm">
          <draw:text-box>
            <text:p text:style-name="P1"><text:span text:style-name="T5"><text:s/></text:span><text:span text:style-name="T5">Automatic </text:span><text:span text:style-name="T5">ingredient </text:span><text:span text:style-name="T5">categorisation </text:span><text:span text:style-name="T5">(dairy,</text:span></text:p>
          </draw:text-box>
        </draw:frame>
        <draw:path draw:style-name="gr4" draw:text-style-name="P5" draw:layer="layout" svg:width="0.185cm" svg:height="0.186cm" svg:x="2.328cm" svg:y="22.33cm" svg:viewBox="0 0 186 187" svg:d="M186 93c0 12-2 24-7 35-5 12-12 23-21 31-9 9-19 16-30 20-11 5-23 8-36 8-12 0-24-3-35-8-11-4-21-11-30-20-9-8-15-19-20-31-5-11-7-23-7-35s2-24 7-36c5-11 11-21 20-30 9-8 19-15 30-20 11-4 23-7 35-7 13 0 25 3 36 7 11 5 21 12 30 20 9 9 16 19 21 30 5 12 7 24 7 36z">
          <text:p/>
        </draw:path>
        <draw:frame draw:style-name="gr3" draw:text-style-name="P4" draw:layer="layout" svg:width="8.702cm" svg:height="0.768cm" svg:x="2.873cm" svg:y="21.049cm">
          <draw:text-box>
            <text:p text:style-name="P1"><text:span text:style-name="T5">vegetables, </text:span><text:span text:style-name="T5">bakery, etc.)</text:span></text:p>
          </draw:text-box>
        </draw:frame>
        <draw:frame draw:style-name="gr3" draw:text-style-name="P4" draw:layer="layout" svg:width="0.722cm" svg:height="0.679cm" svg:x="2.873cm" svg:y="22.055cm">
          <draw:text-box>
            <text:p text:style-name="P1"><text:span text:style-name="T7">🍳</text:span></text:p>
          </draw:text-box>
        </draw:frame>
        <draw:frame draw:style-name="gr3" draw:text-style-name="P4" draw:layer="layout" svg:width="14.962cm" svg:height="0.768cm" svg:x="3.599cm" svg:y="22.002cm">
          <draw:text-box>
            <text:p text:style-name="P1"><text:span text:style-name="T5"><text:s/></text:span><text:span text:style-name="T5">Step‐by‐step </text:span><text:span text:style-name="T5">instructions </text:span><text:span text:style-name="T5">with video </text:span><text:span text:style-name="T5">links</text:span></text:p>
          </draw:text-box>
        </draw:frame>
        <draw:path draw:style-name="gr4" draw:text-style-name="P5" draw:layer="layout" svg:width="0.185cm" svg:height="0.185cm" svg:x="2.328cm" svg:y="24.156cm" svg:viewBox="0 0 186 186" svg:d="M186 93c0 12-2 24-7 35s-12 21-21 30-19 16-30 21-23 7-36 7c-12 0-24-2-35-7s-21-12-30-21-15-19-20-30-7-23-7-35c0-13 2-25 7-36s11-21 20-30 19-15 30-20 23-7 35-7c13 0 25 2 36 7s21 11 30 20 16 19 21 30 7 23 7 36z">
          <text:p/>
        </draw:path>
        <draw:frame draw:style-name="gr3" draw:text-style-name="P4" draw:layer="layout" svg:width="2.783cm" svg:height="0.768cm" svg:x="2.873cm" svg:y="22.875cm">
          <draw:text-box>
            <text:p text:style-name="P1"><text:span text:style-name="T5">(RUTUBE)</text:span></text:p>
          </draw:text-box>
        </draw:frame>
        <draw:frame draw:style-name="gr3" draw:text-style-name="P4" draw:layer="layout" svg:width="0.722cm" svg:height="0.679cm" svg:x="2.873cm" svg:y="23.881cm">
          <draw:text-box>
            <text:p text:style-name="P1"><text:span text:style-name="T7">📱</text:span></text:p>
          </draw:text-box>
        </draw:frame>
        <draw:frame draw:style-name="gr3" draw:text-style-name="P4" draw:layer="layout" svg:width="9.743cm" svg:height="0.768cm" svg:x="3.599cm" svg:y="23.827cm">
          <draw:text-box>
            <text:p text:style-name="P1"><text:span text:style-name="T5"><text:s/></text:span><text:span text:style-name="T5">Works on </text:span><text:span text:style-name="T5">desktop and </text:span><text:span text:style-name="T5">mobile</text:span></text:p>
          </draw:text-box>
        </draw:frame>
        <draw:path draw:style-name="gr4" draw:text-style-name="P5" draw:layer="layout" svg:width="0.185cm" svg:height="0.186cm" svg:x="2.328cm" svg:y="25.287cm" svg:viewBox="0 0 186 187" svg:d="M186 94c0 12-2 24-7 35-5 12-12 22-21 31-9 8-19 15-30 20-11 4-23 7-36 7-12 0-24-3-35-7-11-5-21-12-30-20-9-9-15-19-20-31-5-11-7-23-7-35 0-13 2-25 7-36 5-12 11-22 20-30 9-9 19-16 30-21 11-4 23-7 35-7 13 0 25 3 36 7 11 5 21 12 30 21 9 8 16 18 21 30 5 11 7 23 7 36z">
          <text:p/>
        </draw:path>
        <draw:frame draw:style-name="gr3" draw:text-style-name="P4" draw:layer="layout" svg:width="0.722cm" svg:height="0.679cm" svg:x="2.873cm" svg:y="25.012cm">
          <draw:text-box>
            <text:p text:style-name="P1"><text:span text:style-name="T7">🐍</text:span></text:p>
          </draw:text-box>
        </draw:frame>
        <draw:frame draw:style-name="gr3" draw:text-style-name="P4" draw:layer="layout" svg:width="14.962cm" svg:height="0.768cm" svg:x="3.599cm" svg:y="24.959cm">
          <draw:text-box>
            <text:p text:style-name="P1"><text:span text:style-name="T5"><text:s/></text:span><text:span text:style-name="T5">Built with </text:span><text:span text:style-name="T5">Python (Flask), </text:span><text:span text:style-name="T5">runs locally or</text:span></text:p>
          </draw:text-box>
        </draw:frame>
        <draw:frame draw:style-name="gr3" draw:text-style-name="P4" draw:layer="layout" svg:width="3.829cm" svg:height="0.768cm" svg:x="2.873cm" svg:y="25.832cm">
          <draw:text-box>
            <text:p text:style-name="P1"><text:span text:style-name="T5">on a server</text:span></text:p>
          </draw:text-box>
        </draw:frame>
      </draw:page>
      <draw:page draw:name="page2" draw:style-name="dp1" draw:master-page-name="master-page34">
        <draw:polygon draw:style-name="gr5" draw:text-style-name="P6" draw:layer="layout" svg:width="17.383cm" svg:height="0.053cm" svg:x="1.825cm" svg:y="13.255cm" svg:viewBox="0 0 17384 54" draw:points="0,0 17384,0 17384,54 0,54">
          <text:p/>
        </draw:polygon>
        <draw:polygon draw:style-name="gr5" draw:text-style-name="P6" draw:layer="layout" svg:width="0.027cm" svg:height="1.032cm" svg:x="1.825cm" svg:y="15.901cm" svg:viewBox="0 0 28 1033" draw:points="0,0 28,0 28,1033 0,1033">
          <text:p/>
        </draw:polygon>
        <draw:polygon draw:style-name="gr5" draw:text-style-name="P6" draw:layer="layout" svg:width="7.356cm" svg:height="0.026cm" svg:x="1.825cm" svg:y="15.901cm" svg:viewBox="0 0 7357 27" draw:points="0,0 7357,0 7357,27 0,27">
          <text:p/>
        </draw:polygon>
        <draw:polygon draw:style-name="gr5" draw:text-style-name="P6" draw:layer="layout" svg:width="0.027cm" svg:height="1.032cm" svg:x="9.154cm" svg:y="15.901cm" svg:viewBox="0 0 28 1033" draw:points="0,0 28,0 28,1033 0,1033">
          <text:p/>
        </draw:polygon>
        <draw:polygon draw:style-name="gr5" draw:text-style-name="P6" draw:layer="layout" svg:width="10.027cm" svg:height="0.026cm" svg:x="9.181cm" svg:y="15.901cm" svg:viewBox="0 0 10028 27" draw:points="0,0 10028,0 10028,27 0,27">
          <text:p/>
        </draw:polygon>
        <draw:polygon draw:style-name="gr5" draw:text-style-name="P6" draw:layer="layout" svg:width="0.026cm" svg:height="1.032cm" svg:x="19.182cm" svg:y="15.901cm" svg:viewBox="0 0 27 1033" draw:points="0,0 27,0 27,1033 0,1033">
          <text:p/>
        </draw:polygon>
        <draw:polygon draw:style-name="gr5" draw:text-style-name="P6" draw:layer="layout" svg:width="7.356cm" svg:height="0.027cm" svg:x="1.825cm" svg:y="16.906cm" svg:viewBox="0 0 7357 28" draw:points="0,0 7357,0 7357,28 0,28">
          <text:p/>
        </draw:polygon>
        <draw:polygon draw:style-name="gr5" draw:text-style-name="P6" draw:layer="layout" svg:width="10.027cm" svg:height="0.027cm" svg:x="9.181cm" svg:y="16.906cm" svg:viewBox="0 0 10028 28" draw:points="0,0 10028,0 10028,28 0,28">
          <text:p/>
        </draw:polygon>
        <draw:polygon draw:style-name="gr5" draw:text-style-name="P6" draw:layer="layout" svg:width="0.027cm" svg:height="0.979cm" svg:x="1.825cm" svg:y="16.933cm" svg:viewBox="0 0 28 980" draw:points="0,0 28,0 28,980 0,980">
          <text:p/>
        </draw:polygon>
        <draw:polygon draw:style-name="gr5" draw:text-style-name="P6" draw:layer="layout" svg:width="0.027cm" svg:height="0.979cm" svg:x="9.154cm" svg:y="16.933cm" svg:viewBox="0 0 28 980" draw:points="0,0 28,0 28,980 0,980">
          <text:p/>
        </draw:polygon>
        <draw:polygon draw:style-name="gr5" draw:text-style-name="P6" draw:layer="layout" svg:width="0.026cm" svg:height="0.979cm" svg:x="19.182cm" svg:y="16.933cm" svg:viewBox="0 0 27 980" draw:points="0,0 27,0 27,980 0,980">
          <text:p/>
        </draw:polygon>
        <draw:polygon draw:style-name="gr5" draw:text-style-name="P6" draw:layer="layout" svg:width="0.027cm" svg:height="1.005cm" svg:x="1.825cm" svg:y="17.912cm" svg:viewBox="0 0 28 1006" draw:points="0,0 28,0 28,1006 0,1006">
          <text:p/>
        </draw:polygon>
        <draw:polygon draw:style-name="gr5" draw:text-style-name="P6" draw:layer="layout" svg:width="7.356cm" svg:height="0.027cm" svg:x="1.825cm" svg:y="17.885cm" svg:viewBox="0 0 7357 28" draw:points="0,0 7357,0 7357,28 0,28">
          <text:p/>
        </draw:polygon>
        <draw:polygon draw:style-name="gr5" draw:text-style-name="P6" draw:layer="layout" svg:width="0.027cm" svg:height="1.005cm" svg:x="9.154cm" svg:y="17.912cm" svg:viewBox="0 0 28 1006" draw:points="0,0 28,0 28,1006 0,1006">
          <text:p/>
        </draw:polygon>
        <draw:polygon draw:style-name="gr5" draw:text-style-name="P6" draw:layer="layout" svg:width="10.027cm" svg:height="0.027cm" svg:x="9.181cm" svg:y="17.885cm" svg:viewBox="0 0 10028 28" draw:points="0,0 10028,0 10028,28 0,28">
          <text:p/>
        </draw:polygon>
        <draw:polygon draw:style-name="gr5" draw:text-style-name="P6" draw:layer="layout" svg:width="0.026cm" svg:height="1.005cm" svg:x="19.182cm" svg:y="17.912cm" svg:viewBox="0 0 27 1006" draw:points="0,0 27,0 27,1006 0,1006">
          <text:p/>
        </draw:polygon>
        <draw:polygon draw:style-name="gr5" draw:text-style-name="P6" draw:layer="layout" svg:width="0.027cm" svg:height="0.979cm" svg:x="1.825cm" svg:y="18.917cm" svg:viewBox="0 0 28 980" draw:points="0,0 28,0 28,980 0,980">
          <text:p/>
        </draw:polygon>
        <draw:polygon draw:style-name="gr5" draw:text-style-name="P6" draw:layer="layout" svg:width="7.356cm" svg:height="0.026cm" svg:x="1.825cm" svg:y="18.891cm" svg:viewBox="0 0 7357 27" draw:points="0,0 7357,0 7357,27 0,27">
          <text:p/>
        </draw:polygon>
        <draw:polygon draw:style-name="gr5" draw:text-style-name="P6" draw:layer="layout" svg:width="0.027cm" svg:height="0.979cm" svg:x="9.154cm" svg:y="18.917cm" svg:viewBox="0 0 28 980" draw:points="0,0 28,0 28,980 0,980">
          <text:p/>
        </draw:polygon>
        <draw:polygon draw:style-name="gr5" draw:text-style-name="P6" draw:layer="layout" svg:width="10.027cm" svg:height="0.026cm" svg:x="9.181cm" svg:y="18.891cm" svg:viewBox="0 0 10028 27" draw:points="0,0 10028,0 10028,27 0,27">
          <text:p/>
        </draw:polygon>
        <draw:polygon draw:style-name="gr5" draw:text-style-name="P6" draw:layer="layout" svg:width="0.026cm" svg:height="0.979cm" svg:x="19.182cm" svg:y="18.917cm" svg:viewBox="0 0 27 980" draw:points="0,0 27,0 27,980 0,980">
          <text:p/>
        </draw:polygon>
        <draw:polygon draw:style-name="gr5" draw:text-style-name="P6" draw:layer="layout" svg:width="0.027cm" svg:height="1.773cm" svg:x="1.825cm" svg:y="19.896cm" svg:viewBox="0 0 28 1774" draw:points="0,0 28,0 28,1774 0,1774">
          <text:p/>
        </draw:polygon>
        <draw:polygon draw:style-name="gr5" draw:text-style-name="P6" draw:layer="layout" svg:width="7.356cm" svg:height="0.026cm" svg:x="1.825cm" svg:y="19.87cm" svg:viewBox="0 0 7357 27" draw:points="0,0 7357,0 7357,27 0,27">
          <text:p/>
        </draw:polygon>
        <draw:polygon draw:style-name="gr5" draw:text-style-name="P6" draw:layer="layout" svg:width="0.027cm" svg:height="1.773cm" svg:x="9.154cm" svg:y="19.896cm" svg:viewBox="0 0 28 1774" draw:points="0,0 28,0 28,1774 0,1774">
          <text:p/>
        </draw:polygon>
        <draw:polygon draw:style-name="gr5" draw:text-style-name="P6" draw:layer="layout" svg:width="10.027cm" svg:height="0.026cm" svg:x="9.181cm" svg:y="19.87cm" svg:viewBox="0 0 10028 27" draw:points="0,0 10028,0 10028,27 0,27">
          <text:p/>
        </draw:polygon>
        <draw:polygon draw:style-name="gr5" draw:text-style-name="P6" draw:layer="layout" svg:width="0.026cm" svg:height="1.773cm" svg:x="19.182cm" svg:y="19.896cm" svg:viewBox="0 0 27 1774" draw:points="0,0 27,0 27,1774 0,1774">
          <text:p/>
        </draw:polygon>
        <draw:polygon draw:style-name="gr5" draw:text-style-name="P6" draw:layer="layout" svg:width="7.356cm" svg:height="0.027cm" svg:x="1.825cm" svg:y="21.642cm" svg:viewBox="0 0 7357 28" draw:points="0,0 7357,0 7357,28 0,28">
          <text:p/>
        </draw:polygon>
        <draw:polygon draw:style-name="gr5" draw:text-style-name="P6" draw:layer="layout" svg:width="10.027cm" svg:height="0.027cm" svg:x="9.181cm" svg:y="21.642cm" svg:viewBox="0 0 10028 28" draw:points="0,0 10028,0 10028,28 0,28">
          <text:p/>
        </draw:polygon>
        <draw:frame draw:style-name="gr3" draw:text-style-name="P4" draw:layer="layout" svg:width="4.405cm" svg:height="0.788cm" svg:x="1.826cm" svg:y="0.992cm">
          <draw:text-box>
            <text:p text:style-name="P1"><text:span text:style-name="T4">Why it's useful:</text:span></text:p>
          </draw:text-box>
        </draw:frame>
        <draw:frame draw:style-name="gr3" draw:text-style-name="P4" draw:layer="layout" svg:width="3.249cm" svg:height="0.788cm" svg:x="1.826cm" svg:y="6.495cm">
          <draw:text-box>
            <text:p text:style-name="P1"><text:span text:style-name="T4">Perfect for:</text:span></text:p>
          </draw:text-box>
        </draw:frame>
        <draw:frame draw:style-name="gr2" draw:text-style-name="P3" draw:layer="layout" svg:width="0.955cm" svg:height="0.898cm" svg:x="1.826cm" svg:y="14.158cm">
          <draw:text-box>
            <text:p text:style-name="P1"><text:span text:style-name="T2">🛠</text:span></text:p>
          </draw:text-box>
        </draw:frame>
        <draw:frame draw:style-name="gr2" draw:text-style-name="P3" draw:layer="layout" svg:width="5.056cm" svg:height="1.013cm" svg:x="2.777cm" svg:y="14.087cm">
          <draw:text-box>
            <text:p text:style-name="P1"><text:span text:style-name="T3"><text:s/></text:span><text:span text:style-name="T3">Tech Stack</text:span></text:p>
          </draw:text-box>
        </draw:frame>
        <draw:frame draw:style-name="gr3" draw:text-style-name="P4" draw:layer="layout" svg:width="3.329cm" svg:height="0.788cm" svg:x="2.064cm" svg:y="15.967cm">
          <draw:text-box>
            <text:p text:style-name="P1"><text:span text:style-name="T8">Technology</text:span></text:p>
          </draw:text-box>
        </draw:frame>
        <draw:frame draw:style-name="gr3" draw:text-style-name="P4" draw:layer="layout" svg:width="2.364cm" svg:height="0.788cm" svg:x="9.4cm" svg:y="15.967cm">
          <draw:text-box>
            <text:p text:style-name="P1"><text:span text:style-name="T8">Purpose</text:span></text:p>
          </draw:text-box>
        </draw:frame>
        <draw:frame draw:style-name="gr3" draw:text-style-name="P4" draw:layer="layout" svg:width="4.87cm" svg:height="0.768cm" svg:x="2.064cm" svg:y="17.001cm">
          <draw:text-box>
            <text:p text:style-name="P1"><text:span text:style-name="T9">Python + Flask</text:span></text:p>
          </draw:text-box>
        </draw:frame>
        <draw:frame draw:style-name="gr3" draw:text-style-name="P4" draw:layer="layout" svg:width="4.87cm" svg:height="0.768cm" svg:x="9.4cm" svg:y="17.001cm">
          <draw:text-box>
            <text:p text:style-name="P1"><text:span text:style-name="T9">Backend server</text:span></text:p>
          </draw:text-box>
        </draw:frame>
        <draw:frame draw:style-name="gr3" draw:text-style-name="P4" draw:layer="layout" svg:width="3.829cm" svg:height="0.768cm" svg:x="2.064cm" svg:y="17.98cm">
          <draw:text-box>
            <text:p text:style-name="P1"><text:span text:style-name="T9">HTML/CSS/JS</text:span></text:p>
          </draw:text-box>
        </draw:frame>
        <draw:frame draw:style-name="gr3" draw:text-style-name="P4" draw:layer="layout" svg:width="6.263cm" svg:height="0.768cm" svg:x="9.4cm" svg:y="17.98cm">
          <draw:text-box>
            <text:p text:style-name="P1"><text:span text:style-name="T9">Frontend </text:span><text:span text:style-name="T9">interface</text:span></text:p>
          </draw:text-box>
        </draw:frame>
        <draw:frame draw:style-name="gr3" draw:text-style-name="P4" draw:layer="layout" svg:width="1.391cm" svg:height="0.768cm" svg:x="2.064cm" svg:y="18.985cm">
          <draw:text-box>
            <text:p text:style-name="P1"><text:span text:style-name="T9">JSON</text:span></text:p>
          </draw:text-box>
        </draw:frame>
        <draw:frame draw:style-name="gr3" draw:text-style-name="P4" draw:layer="layout" svg:width="5.222cm" svg:height="0.768cm" svg:x="9.4cm" svg:y="18.985cm">
          <draw:text-box>
            <text:p text:style-name="P1"><text:span text:style-name="T9">Recipe database</text:span></text:p>
          </draw:text-box>
        </draw:frame>
        <draw:frame draw:style-name="gr3" draw:text-style-name="P4" draw:layer="layout" svg:width="4.176cm" svg:height="0.768cm" svg:x="2.064cm" svg:y="19.964cm">
          <draw:text-box>
            <text:p text:style-name="P1"><text:span text:style-name="T9">No database </text:span></text:p>
          </draw:text-box>
        </draw:frame>
        <draw:frame draw:style-name="gr3" draw:text-style-name="P4" draw:layer="layout" svg:width="2.783cm" svg:height="0.768cm" svg:x="2.064cm" svg:y="20.732cm">
          <draw:text-box>
            <text:p text:style-name="P1"><text:span text:style-name="T9">required</text:span></text:p>
          </draw:text-box>
        </draw:frame>
        <draw:frame draw:style-name="gr3" draw:text-style-name="P4" draw:layer="layout" svg:width="8.35cm" svg:height="0.768cm" svg:x="9.4cm" svg:y="19.964cm">
          <draw:text-box>
            <text:p text:style-name="P1"><text:span text:style-name="T9">Runs from a </text:span><text:span text:style-name="T9">single JSON </text:span></text:p>
          </draw:text-box>
        </draw:frame>
        <draw:frame draw:style-name="gr3" draw:text-style-name="P4" draw:layer="layout" svg:width="1.391cm" svg:height="0.768cm" svg:x="9.4cm" svg:y="20.732cm">
          <draw:text-box>
            <text:p text:style-name="P1"><text:span text:style-name="T9">file</text:span></text:p>
          </draw:text-box>
        </draw:frame>
        <draw:path draw:style-name="gr4" draw:text-style-name="P5" draw:layer="layout" svg:width="0.185cm" svg:height="0.185cm" svg:x="2.328cm" svg:y="2.672cm" svg:viewBox="0 0 186 186" svg:d="M186 93c0 13-2 24-7 36-5 11-12 21-21 30s-19 15-30 20-23 7-36 7c-12 0-24-2-35-7s-21-11-30-20-15-19-20-30c-5-12-7-23-7-36 0-12 2-24 7-35s11-21 20-30 19-15 30-21c11-5 23-7 35-7 13 0 25 2 36 7 11 6 21 12 30 21s16 19 21 30 7 23 7 35z">
          <text:p/>
        </draw:path>
        <draw:path draw:style-name="gr4" draw:text-style-name="P5" draw:layer="layout" svg:width="0.185cm" svg:height="0.185cm" svg:x="2.328cm" svg:y="3.624cm" svg:viewBox="0 0 186 186" svg:d="M186 93c0 12-2 24-7 35-5 12-12 22-21 30-9 9-19 17-30 21-11 5-23 7-36 7-12 0-24-2-35-7-11-4-21-12-30-21-9-8-15-18-20-30-5-11-7-23-7-35s2-24 7-36c5-11 11-21 20-30 9-8 19-15 30-20 11-4 23-7 35-7 13 0 25 3 36 7 11 5 21 12 30 20 9 9 16 19 21 30 5 12 7 24 7 36z">
          <text:p/>
        </draw:path>
        <draw:frame draw:style-name="gr3" draw:text-style-name="P4" draw:layer="layout" svg:width="6.263cm" svg:height="0.768cm" svg:x="2.873cm" svg:y="2.343cm">
          <draw:text-box>
            <text:p text:style-name="P1"><text:span text:style-name="T5">Reduces food </text:span><text:span text:style-name="T5">waste</text:span></text:p>
          </draw:text-box>
        </draw:frame>
        <draw:path draw:style-name="gr4" draw:text-style-name="P5" draw:layer="layout" svg:width="0.185cm" svg:height="0.185cm" svg:x="2.328cm" svg:y="4.577cm" svg:viewBox="0 0 186 186" svg:d="M186 92c0 13-2 24-7 36-5 11-12 22-21 31s-19 15-30 20-23 7-36 7c-12 0-24-2-35-7s-21-11-30-20-15-20-20-31c-5-12-7-23-7-36 0-12 2-24 7-35s11-21 20-30 19-15 30-20 23-7 35-7c13 0 25 2 36 7s21 11 30 20 16 19 21 30 7 23 7 35z">
          <text:p/>
        </draw:path>
        <draw:frame draw:style-name="gr3" draw:text-style-name="P4" draw:layer="layout" svg:width="6.962cm" svg:height="0.768cm" svg:x="2.873cm" svg:y="3.296cm">
          <draw:text-box>
            <text:p text:style-name="P1"><text:span text:style-name="T5">Saves time and </text:span><text:span text:style-name="T5">money</text:span></text:p>
          </draw:text-box>
        </draw:frame>
        <draw:path draw:style-name="gr4" draw:text-style-name="P5" draw:layer="layout" svg:width="0.185cm" svg:height="0.185cm" svg:x="2.328cm" svg:y="5.529cm" svg:viewBox="0 0 186 186" svg:d="M186 93c0 12-2 25-7 36-5 12-12 22-21 30-9 9-19 16-30 20-11 5-23 7-36 7-12 0-24-2-35-7-11-4-21-11-30-20-9-8-15-18-20-30-5-11-7-24-7-36s2-24 7-36c5-11 11-21 20-30 9-8 19-15 30-20 11-4 23-7 35-7 13 0 25 3 36 7 11 5 21 12 30 20 9 9 16 19 21 30 5 12 7 24 7 36z">
          <text:p/>
        </draw:path>
        <draw:frame draw:style-name="gr3" draw:text-style-name="P4" draw:layer="layout" svg:width="6.263cm" svg:height="0.768cm" svg:x="2.873cm" svg:y="4.248cm">
          <draw:text-box>
            <text:p text:style-name="P1"><text:span text:style-name="T5">Helps novice </text:span><text:span text:style-name="T5">cooks</text:span></text:p>
          </draw:text-box>
        </draw:frame>
        <draw:path draw:style-name="gr4" draw:text-style-name="P5" draw:layer="layout" svg:width="0.185cm" svg:height="0.185cm" svg:x="2.328cm" svg:y="8.175cm" svg:viewBox="0 0 186 186" svg:d="M186 94c0 12-2 24-7 35-5 12-12 22-21 30-9 9-19 16-30 20-11 5-23 7-36 7-12 0-24-2-35-7-11-4-21-11-30-20-9-8-15-18-20-30-5-11-7-23-7-35 0-13 2-24 7-37 5-11 11-21 20-30 9-8 19-15 30-20s23-7 35-7c13 0 25 2 36 7s21 12 30 20c9 9 16 19 21 30 5 13 7 24 7 37z">
          <text:p/>
        </draw:path>
        <draw:frame draw:style-name="gr3" draw:text-style-name="P4" draw:layer="layout" svg:width="9.396cm" svg:height="0.768cm" svg:x="2.873cm" svg:y="5.201cm">
          <draw:text-box>
            <text:p text:style-name="P1"><text:span text:style-name="T5">Works offline </text:span><text:span text:style-name="T5">(once loaded)</text:span></text:p>
          </draw:text-box>
        </draw:frame>
        <draw:path draw:style-name="gr4" draw:text-style-name="P5" draw:layer="layout" svg:width="0.185cm" svg:height="0.185cm" svg:x="2.328cm" svg:y="9.128cm" svg:viewBox="0 0 186 186" svg:d="M186 93c0 13-2 24-7 36-5 11-12 21-21 30-9 8-19 15-30 20-11 4-23 7-36 7-12 0-24-3-35-7-11-5-21-12-30-20-9-9-15-19-20-30-5-12-7-23-7-36 0-12 2-24 7-35 5-12 11-22 20-31s19-16 30-20c11-5 23-7 35-7 13 0 25 2 36 7 11 4 21 11 30 20s16 19 21 31c5 11 7 23 7 35z">
          <text:p/>
        </draw:path>
        <draw:frame draw:style-name="gr3" draw:text-style-name="P4" draw:layer="layout" svg:width="3.482cm" svg:height="0.768cm" svg:x="2.873cm" svg:y="7.846cm">
          <draw:text-box>
            <text:p text:style-name="P1"><text:span text:style-name="T5">Home cooks</text:span></text:p>
          </draw:text-box>
        </draw:frame>
        <draw:path draw:style-name="gr4" draw:text-style-name="P5" draw:layer="layout" svg:width="0.185cm" svg:height="0.185cm" svg:x="2.328cm" svg:y="10.08cm" svg:viewBox="0 0 186 186" svg:d="M186 94c0 12-2 24-7 35-5 12-12 22-21 30-9 9-19 16-30 20-11 5-23 7-36 7-12 0-24-2-35-7-11-4-21-11-30-20-9-8-15-18-20-30-5-11-7-23-7-35 0-13 2-24 7-36 5-11 11-21 20-30 9-8 19-15 30-20 11-6 23-8 35-8 13 0 25 2 36 8 11 5 21 12 30 20 9 9 16 19 21 30 5 12 7 23 7 36z">
          <text:p/>
        </draw:path>
        <draw:frame draw:style-name="gr3" draw:text-style-name="P4" draw:layer="layout" svg:width="2.783cm" svg:height="0.768cm" svg:x="2.873cm" svg:y="8.799cm">
          <draw:text-box>
            <text:p text:style-name="P1"><text:span text:style-name="T5">Students</text:span></text:p>
          </draw:text-box>
        </draw:frame>
        <draw:path draw:style-name="gr4" draw:text-style-name="P5" draw:layer="layout" svg:width="0.185cm" svg:height="0.185cm" svg:x="2.328cm" svg:y="11.059cm" svg:viewBox="0 0 186 186" svg:d="M186 93c0 12-2 24-7 35-5 12-12 22-21 31s-19 16-30 20c-11 5-23 7-36 7-12 0-24-2-35-7-11-4-21-11-30-20s-15-19-20-31c-5-11-7-23-7-35 0-13 2-24 7-36 5-11 11-21 20-30 9-8 19-15 30-20s23-7 35-7c13 0 25 2 36 7s21 12 30 20c9 9 16 19 21 30 5 12 7 23 7 36z">
          <text:p/>
        </draw:path>
        <draw:frame draw:style-name="gr3" draw:text-style-name="P4" draw:layer="layout" svg:width="2.783cm" svg:height="0.768cm" svg:x="2.873cm" svg:y="9.751cm">
          <draw:text-box>
            <text:p text:style-name="P1"><text:span text:style-name="T5">Families</text:span></text:p>
          </draw:text-box>
        </draw:frame>
        <draw:frame draw:style-name="gr3" draw:text-style-name="P4" draw:layer="layout" svg:width="12.177cm" svg:height="0.768cm" svg:x="2.873cm" svg:y="10.73cm">
          <draw:text-box>
            <text:p text:style-name="P1"><text:span text:style-name="T5">Anyone who </text:span><text:span text:style-name="T5">wants to cook </text:span><text:span text:style-name="T5">simply and</text:span></text:p>
          </draw:text-box>
        </draw:frame>
        <draw:frame draw:style-name="gr3" draw:text-style-name="P4" draw:layer="layout" svg:width="3.829cm" svg:height="0.768cm" svg:x="2.873cm" svg:y="11.604cm">
          <draw:text-box>
            <text:p text:style-name="P1"><text:span text:style-name="T5">practically</text:span></text:p>
          </draw:text-box>
        </draw:frame>
      </draw:page>
      <draw:page draw:name="page3" draw:style-name="dp1" draw:master-page-name="master-page34">
        <draw:polygon draw:style-name="gr5" draw:text-style-name="P6" draw:layer="layout" svg:width="17.383cm" svg:height="0.053cm" svg:x="1.825cm" svg:y="8.493cm" svg:viewBox="0 0 17384 54" draw:points="0,0 17384,0 17384,54 0,54">
          <text:p/>
        </draw:polygon>
        <draw:polygon draw:style-name="gr5" draw:text-style-name="P6" draw:layer="layout" svg:width="17.383cm" svg:height="0.053cm" svg:x="1.825cm" svg:y="17.7cm" svg:viewBox="0 0 17384 54" draw:points="0,0 17384,0 17384,54 0,54">
          <text:p/>
        </draw:polygon>
        <draw:polygon draw:style-name="gr6" draw:text-style-name="P7" draw:layer="layout" svg:width="0.053cm" svg:height="1.747cm" svg:x="1.825cm" svg:y="20.134cm" svg:viewBox="0 0 54 1748" draw:points="0,0 54,0 54,1748 0,1748">
          <text:p/>
        </draw:polygon>
        <draw:polygon draw:style-name="gr5" draw:text-style-name="P6" draw:layer="layout" svg:width="17.383cm" svg:height="0.053cm" svg:x="1.825cm" svg:y="25.003cm" svg:viewBox="0 0 17384 54" draw:points="0,0 17384,0 17384,54 0,54">
          <text:p/>
        </draw:polygon>
        <draw:frame draw:style-name="gr2" draw:text-style-name="P3" draw:layer="layout" svg:width="0.955cm" svg:height="0.898cm" svg:x="1.826cm" svg:y="1.034cm">
          <draw:text-box>
            <text:p text:style-name="P1"><text:span text:style-name="T2">🚀</text:span></text:p>
          </draw:text-box>
        </draw:frame>
        <draw:frame draw:style-name="gr2" draw:text-style-name="P3" draw:layer="layout" svg:width="7.351cm" svg:height="1.013cm" svg:x="2.777cm" svg:y="0.964cm">
          <draw:text-box>
            <text:p text:style-name="P1"><text:span text:style-name="T3"><text:s/></text:span><text:span text:style-name="T3">Getting </text:span><text:span text:style-name="T3">Started</text:span></text:p>
          </draw:text-box>
        </draw:frame>
        <draw:path draw:style-name="gr7" draw:text-style-name="P8" draw:layer="layout" svg:width="6.746cm" svg:height="0.767cm" svg:x="5.318cm" svg:y="6.905cm" svg:viewBox="0 0 6747 768" svg:d="M0 663v-557c0-14 2-28 8-41 5-13 13-24 23-34s21-17 34-23c13-5 26-8 40-8h6537c14 0 27 3 40 8 13 6 25 13 35 23 9 10 17 21 22 34 6 13 8 27 8 41v557c0 14-2 27-8 40-5 13-13 24-22 34-10 10-22 18-35 23-13 6-26 8-40 8h-6537c-14 0-27-2-40-8-13-5-24-13-34-23s-18-21-23-34c-6-13-8-26-8-40z">
          <text:p/>
        </draw:path>
        <draw:frame draw:style-name="gr3" draw:text-style-name="P4" draw:layer="layout" svg:width="3.482cm" svg:height="0.768cm" svg:x="1.826cm" svg:y="6.868cm">
          <draw:text-box>
            <text:p text:style-name="P1"><text:span text:style-name="T5">Then open </text:span></text:p>
          </draw:text-box>
        </draw:frame>
        <draw:frame draw:style-name="gr8" draw:text-style-name="P9" draw:layer="layout" svg:width="6.424cm" svg:height="0.59cm" svg:x="5.471cm" svg:y="6.985cm">
          <draw:text-box>
            <text:p text:style-name="P1"><text:span text:style-name="T10">http://</text:span><text:span text:style-name="T10">localhost:5000</text:span></text:p>
          </draw:text-box>
        </draw:frame>
        <draw:frame draw:style-name="gr3" draw:text-style-name="P4" draw:layer="layout" svg:width="5.916cm" svg:height="0.768cm" svg:x="12.063cm" svg:y="6.868cm">
          <draw:text-box>
            <text:p text:style-name="P1"><text:span text:style-name="T5"><text:s/></text:span><text:span text:style-name="T5">in your </text:span><text:span text:style-name="T5">browser.</text:span></text:p>
          </draw:text-box>
        </draw:frame>
        <draw:frame draw:style-name="gr2" draw:text-style-name="P3" draw:layer="layout" svg:width="0.955cm" svg:height="0.898cm" svg:x="1.826cm" svg:y="9.395cm">
          <draw:text-box>
            <text:p text:style-name="P1"><text:span text:style-name="T2">📁</text:span></text:p>
          </draw:text-box>
        </draw:frame>
        <draw:frame draw:style-name="gr2" draw:text-style-name="P3" draw:layer="layout" svg:width="8.274cm" svg:height="1.013cm" svg:x="2.777cm" svg:y="9.325cm">
          <draw:text-box>
            <text:p text:style-name="P1"><text:span text:style-name="T3"><text:s/></text:span><text:span text:style-name="T3">Project </text:span><text:span text:style-name="T3">Structure</text:span></text:p>
          </draw:text-box>
        </draw:frame>
        <draw:frame draw:style-name="gr2" draw:text-style-name="P3" draw:layer="layout" svg:width="0.955cm" svg:height="0.898cm" svg:x="1.826cm" svg:y="18.603cm">
          <draw:text-box>
            <text:p text:style-name="P1"><text:span text:style-name="T2">👨‍🍳</text:span></text:p>
          </draw:text-box>
        </draw:frame>
        <draw:frame draw:style-name="gr2" draw:text-style-name="P3" draw:layer="layout" svg:width="5.056cm" svg:height="1.013cm" svg:x="2.777cm" svg:y="18.532cm">
          <draw:text-box>
            <text:p text:style-name="P1"><text:span text:style-name="T3"><text:s/></text:span><text:span text:style-name="T3">Philosophy</text:span></text:p>
          </draw:text-box>
        </draw:frame>
        <draw:frame draw:style-name="gr3" draw:text-style-name="P4" draw:layer="layout" svg:width="14.963cm" svg:height="0.768cm" svg:x="2.514cm" svg:y="20.176cm">
          <draw:text-box>
            <text:p text:style-name="P1"><text:span text:style-name="T6">"Cook with what </text:span><text:span text:style-name="T6">you have, not </text:span><text:span text:style-name="T6">with what you</text:span></text:p>
          </draw:text-box>
        </draw:frame>
        <draw:frame draw:style-name="gr3" draw:text-style-name="P4" draw:layer="layout" svg:width="2.436cm" svg:height="0.768cm" svg:x="2.514cm" svg:y="21.049cm">
          <draw:text-box>
            <text:p text:style-name="P1"><text:span text:style-name="T6">don't."</text:span></text:p>
          </draw:text-box>
        </draw:frame>
        <draw:frame draw:style-name="gr3" draw:text-style-name="P4" draw:layer="layout" svg:width="16.703cm" svg:height="0.768cm" svg:x="1.826cm" svg:y="22.504cm">
          <draw:text-box>
            <text:p text:style-name="P1"><text:span text:style-name="T5">No </text:span><text:span text:style-name="T5">subscriptions. </text:span><text:span text:style-name="T5">No accounts. No </text:span><text:span text:style-name="T5">tracking. Just</text:span></text:p>
          </draw:text-box>
        </draw:frame>
        <draw:frame draw:style-name="gr3" draw:text-style-name="P4" draw:layer="layout" svg:width="13.223cm" svg:height="0.768cm" svg:x="1.826cm" svg:y="23.378cm">
          <draw:text-box>
            <text:p text:style-name="P1"><text:span text:style-name="T5">a practical </text:span><text:span text:style-name="T5">tool for </text:span><text:span text:style-name="T5">everyday </text:span><text:span text:style-name="T5">cooking.</text:span></text:p>
          </draw:text-box>
        </draw:frame>
        <draw:frame draw:style-name="gr2" draw:text-style-name="P3" draw:layer="layout" svg:width="0.955cm" svg:height="0.898cm" svg:x="1.826cm" svg:y="25.905cm">
          <draw:text-box>
            <text:p text:style-name="P1"><text:span text:style-name="T2">📄</text:span></text:p>
          </draw:text-box>
        </draw:frame>
        <draw:frame draw:style-name="gr2" draw:text-style-name="P3" draw:layer="layout" svg:width="3.676cm" svg:height="1.013cm" svg:x="2.777cm" svg:y="25.835cm">
          <draw:text-box>
            <text:p text:style-name="P1"><text:span text:style-name="T3"><text:s/></text:span><text:span text:style-name="T3">License</text:span></text:p>
          </draw:text-box>
        </draw:frame>
        <draw:path draw:style-name="gr7" draw:text-style-name="P8" draw:layer="layout" svg:width="17.383cm" svg:height="3.678cm" svg:x="1.825cm" svg:y="2.566cm" svg:viewBox="0 0 17384 3679" svg:d="M0 3573v-3467c0-14 3-28 8-41 6-13 13-24 23-34s21-18 34-23 27-8 41-8h17172c14 0 28 3 41 8s24 13 34 23 18 21 23 34c6 13 8 27 8 41v3467c0 14-2 27-8 40-5 13-13 25-23 35s-21 17-34 23c-13 5-27 8-41 8h-17172c-14 0-28-3-41-8-13-6-24-13-34-23s-17-22-23-35c-5-13-8-26-8-40z">
          <text:p/>
        </draw:path>
        <draw:frame draw:style-name="gr3" draw:text-style-name="P4" draw:layer="layout" svg:width="14.963cm" svg:height="0.768cm" svg:x="1.826cm" svg:y="27.267cm">
          <draw:text-box>
            <text:p text:style-name="P1"><text:span text:style-name="T5">MIT — free for </text:span><text:span text:style-name="T5">personal and </text:span><text:span text:style-name="T5">commercial use.</text:span></text:p>
          </draw:text-box>
        </draw:frame>
        <draw:frame draw:style-name="gr8" draw:text-style-name="P9" draw:layer="layout" svg:width="7.639cm" svg:height="0.59cm" svg:x="2.249cm" svg:y="2.94cm">
          <draw:text-box>
            <text:p text:style-name="P1"><text:span text:style-name="T11">git</text:span><text:span text:style-name="T10"> clone </text:span><text:span text:style-name="T12">&lt;</text:span><text:span text:style-name="T10">your-</text:span><text:span text:style-name="T10">repo-url</text:span><text:span text:style-name="T12">&gt;</text:span></text:p>
          </draw:text-box>
        </draw:frame>
        <draw:frame draw:style-name="gr8" draw:text-style-name="P9" draw:layer="layout" svg:width="6.115cm" svg:height="0.59cm" svg:x="2.249cm" svg:y="3.708cm">
          <draw:text-box>
            <text:p text:style-name="P1"><text:span text:style-name="T11">cd</text:span><text:span text:style-name="T10"> </text:span><text:span text:style-name="T10">refrigerator_chef</text:span></text:p>
          </draw:text-box>
        </draw:frame>
        <draw:frame draw:style-name="gr8" draw:text-style-name="P9" draw:layer="layout" svg:width="5.192cm" svg:height="0.59cm" svg:x="2.249cm" svg:y="4.449cm">
          <draw:text-box>
            <text:p text:style-name="P1"><text:span text:style-name="T10">pip </text:span><text:span text:style-name="T11">install</text:span><text:span text:style-name="T10"> flask</text:span></text:p>
          </draw:text-box>
        </draw:frame>
        <draw:path draw:style-name="gr7" draw:text-style-name="P8" draw:layer="layout" svg:width="17.383cm" svg:height="5.979cm" svg:x="1.825cm" svg:y="10.927cm" svg:viewBox="0 0 17384 5980" svg:d="M0 5875v-5769c0-14 3-28 8-41 6-13 13-24 23-34s21-18 34-23c13-6 27-8 41-8h17172c14 0 28 2 41 8 13 5 24 13 34 23s18 21 23 34c6 13 8 27 8 41v5769c0 14-2 27-8 40-5 13-13 24-23 34s-21 18-34 23c-13 6-27 8-41 8h-17172c-14 0-28-2-41-8-13-5-24-13-34-23s-17-21-23-34c-5-13-8-26-8-40z">
          <text:p/>
        </draw:path>
        <draw:frame draw:style-name="gr8" draw:text-style-name="P9" draw:layer="layout" svg:width="4.282cm" svg:height="0.59cm" svg:x="2.249cm" svg:y="5.216cm">
          <draw:text-box>
            <text:p text:style-name="P1"><text:span text:style-name="T10">python3 app.py</text:span></text:p>
          </draw:text-box>
        </draw:frame>
        <draw:frame draw:style-name="gr8" draw:text-style-name="P9" draw:layer="layout" svg:width="5.505cm" svg:height="0.59cm" svg:x="2.249cm" svg:y="11.301cm">
          <draw:text-box>
            <text:p text:style-name="P1"><text:span text:style-name="T10">refrigerator_chef</text:span><text:span text:style-name="T10">/</text:span></text:p>
          </draw:text-box>
        </draw:frame>
        <draw:frame draw:style-name="gr8" draw:text-style-name="P9" draw:layer="layout" svg:width="14.675cm" svg:height="0.59cm" svg:x="2.249cm" svg:y="12.069cm">
          <draw:text-box>
            <text:p text:style-name="P1"><text:span text:style-name="T10">├── </text:span><text:span text:style-name="T10">app.py <text:s text:c="7"/></text:span><text:span text:style-name="T10"><text:s text:c="6"/># Main </text:span><text:span text:style-name="T10">Flask application</text:span></text:p>
          </draw:text-box>
        </draw:frame>
        <draw:frame draw:style-name="gr8" draw:text-style-name="P9" draw:layer="layout" svg:width="12.537cm" svg:height="0.59cm" svg:x="2.249cm" svg:y="12.836cm">
          <draw:text-box>
            <text:p text:style-name="P1"><text:span text:style-name="T10">├── </text:span><text:span text:style-name="T10">recipes.json <text:s/></text:span><text:span text:style-name="T10"><text:s text:c="6"/># Recipe </text:span><text:span text:style-name="T10">database</text:span></text:p>
          </draw:text-box>
        </draw:frame>
        <draw:frame draw:style-name="gr8" draw:text-style-name="P9" draw:layer="layout" svg:width="3.359cm" svg:height="0.59cm" svg:x="2.249cm" svg:y="13.603cm">
          <draw:text-box>
            <text:p text:style-name="P1"><text:span text:style-name="T10">├── </text:span><text:span text:style-name="T10">static/</text:span></text:p>
          </draw:text-box>
        </draw:frame>
        <draw:frame draw:style-name="gr8" draw:text-style-name="P9" draw:layer="layout" svg:width="16.208cm" svg:height="0.59cm" svg:x="2.249cm" svg:y="14.344cm">
          <draw:text-box>
            <text:p text:style-name="P1"><text:span text:style-name="T10">│ <text:s text:c="2"/>└── </text:span><text:span text:style-name="T10">bg.jpg <text:s text:c="3"/></text:span><text:span text:style-name="T10"><text:s text:c="6"/># </text:span><text:span text:style-name="T10">Background image </text:span><text:span text:style-name="T10">(optional)</text:span></text:p>
          </draw:text-box>
        </draw:frame>
        <draw:frame draw:style-name="gr8" draw:text-style-name="P9" draw:layer="layout" svg:width="4.277cm" svg:height="0.59cm" svg:x="2.249cm" svg:y="15.111cm">
          <draw:text-box>
            <text:p text:style-name="P1"><text:span text:style-name="T10">└── </text:span><text:span text:style-name="T10">templates/</text:span></text:p>
          </draw:text-box>
        </draw:frame>
        <draw:frame draw:style-name="gr8" draw:text-style-name="P9" draw:layer="layout" svg:width="7.948cm" svg:height="0.59cm" svg:x="2.249cm" svg:y="15.879cm">
          <draw:text-box>
            <text:p text:style-name="P1"><text:span text:style-name="T10"><text:s text:c="4"/>└── </text:span><text:span text:style-name="T10">(inline </text:span><text:span text:style-name="T10">in app.py)</text:span></text:p>
          </draw:text-box>
        </draw:frame>
      </draw:page>
      <draw:page draw:name="page4" draw:style-name="dp1" draw:master-page-name="master-page55">
        <draw:polygon draw:style-name="gr5" draw:text-style-name="P6" draw:layer="layout" svg:width="17.383cm" svg:height="0.053cm" svg:x="1.825cm" svg:y="0.978cm" svg:viewBox="0 0 17384 54" draw:points="0,0 17384,0 17384,54 0,54">
          <text:p/>
        </draw:polygon>
        <draw:frame draw:style-name="gr2" draw:text-style-name="P3" draw:layer="layout" svg:width="0.955cm" svg:height="0.898cm" svg:x="1.826cm" svg:y="1.881cm">
          <draw:text-box>
            <text:p text:style-name="P1"><text:span text:style-name="T2">🙋‍♂️</text:span></text:p>
          </draw:text-box>
        </draw:frame>
        <draw:frame draw:style-name="gr2" draw:text-style-name="P3" draw:layer="layout" svg:width="3.215cm" svg:height="1.013cm" svg:x="2.777cm" svg:y="1.811cm">
          <draw:text-box>
            <text:p text:style-name="P1"><text:span text:style-name="T3"><text:s/></text:span><text:span text:style-name="T3">Author</text:span></text:p>
          </draw:text-box>
        </draw:frame>
        <draw:frame draw:style-name="gr3" draw:text-style-name="P4" draw:layer="layout" svg:width="17.05cm" svg:height="0.768cm" svg:x="1.826cm" svg:y="3.269cm">
          <draw:text-box>
            <text:p text:style-name="P1"><text:span text:style-name="T5">Created as a </text:span><text:span text:style-name="T5">practical </text:span><text:span text:style-name="T5">solution for </text:span><text:span text:style-name="T5">home </text:span><text:span text:style-name="T5">cooking.</text:span></text:p>
          </draw:text-box>
        </draw:frame>
        <draw:frame draw:style-name="gr2" draw:text-style-name="P3" draw:layer="layout" svg:width="0.955cm" svg:height="0.898cm" svg:x="1.826cm" svg:y="5.163cm">
          <draw:text-box>
            <text:p text:style-name="P1"><text:span text:style-name="T2">📸</text:span></text:p>
          </draw:text-box>
        </draw:frame>
        <draw:frame draw:style-name="gr2" draw:text-style-name="P3" draw:layer="layout" svg:width="8.731cm" svg:height="1.013cm" svg:x="2.777cm" svg:y="5.093cm">
          <draw:text-box>
            <text:p text:style-name="P1"><text:span text:style-name="T3"><text:s/></text:span><text:span text:style-name="T3">Screenshot </text:span><text:span text:style-name="T3">Preview</text:span></text:p>
          </draw:text-box>
        </draw:frame>
        <draw:frame draw:style-name="gr9" draw:text-style-name="P10" draw:layer="layout" svg:width="14.433cm" svg:height="9.645cm" svg:x="2.9cm" svg:y="17.694cm">
          <draw:image xlink:href="Pictures/100000010000056200000399EF2650FD.png" xlink:type="simple" xlink:show="embed" xlink:actuate="onLoad" draw:mime-type="image/png">
            <text:p/>
          </draw:image>
        </draw:frame>
        <draw:frame draw:style-name="gr9" draw:text-style-name="P10" draw:layer="layout" svg:width="14.504cm" svg:height="9.693cm" svg:x="2.9cm" svg:y="6.998cm">
          <draw:image xlink:href="Pictures/1000000100000562000003991455A6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Mono" svg:font-family="DejaVuSansMono"/>
    <style:font-face style:name="JetBrainsMonoNL" svg:font-family="JetBrainsMonoNL"/>
    <style:font-face style:name="JetBrainsMonoNL-Semi" svg:font-family="JetBrainsMonoNL-S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ColorEmoji" svg:font-family="NotoColorEmoji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1.8cm" fo:margin-right="1.8cm" fo:page-width="21.022cm" fo:page-height="29.7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5T21:39:02.089494996</dc:date>
    <meta:editing-duration>PT5M44S</meta:editing-duration>
    <meta:editing-cycles>1</meta:editing-cycles>
    <meta:document-statistic meta:object-count="142"/>
    <meta:generator>LibreOffice/24.2.7.2$Linux_X86_64 LibreOffice_project/420$Build-2</meta:generator>
  </office:meta>
</office:document-meta>
</file>